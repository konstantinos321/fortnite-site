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D200000293E40D22C2.png" manifest:media-type="image/png"/>
  <manifest:file-entry manifest:full-path="Pictures/1000000000000384000001F49835FC81.jpg" manifest:media-type="image/jpeg"/>
  <manifest:file-entry manifest:full-path="Pictures/1000000000000384000001F42C3ADFAB.jpg" manifest:media-type="image/jpeg"/>
  <manifest:file-entry manifest:full-path="Pictures/1000000000000258000001B8755DEF0B.jpg" manifest:media-type="image/jpeg"/>
  <manifest:file-entry manifest:full-path="Pictures/10000000000004B00000031D9C3A8603.jpg" manifest:media-type="image/jpeg"/>
  <manifest:file-entry manifest:full-path="Pictures/1000000000000280000001A47A4140C5.png" manifest:media-type="image/png"/>
  <manifest:file-entry manifest:full-path="Pictures/1000000000000280000001D62342B495.jpg" manifest:media-type="image/jpeg"/>
  <manifest:file-entry manifest:full-path="Pictures/10000000000004B0000002A334C7F816.jpg" manifest:media-type="image/jpeg"/>
  <manifest:file-entry manifest:full-path="Pictures/100000000000076C000003CF5C394CFE.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decorative="false"/>
      <style:paragraph-properties style:writing-mode="lr-tb"/>
    </style:style>
    <style:style style:name="gr4" style:family="graphic" style:parent-style-name="standard">
      <style:graphic-properties loext:decorative="false"/>
    </style:style>
    <style:style style:name="pr1" style:family="presentation" style:parent-style-name="Vivid1-title">
      <style:graphic-properties fo:min-height="0.101cm" loext:decorative="false"/>
      <style:paragraph-properties style:writing-mode="lr-tb"/>
    </style:style>
    <style:style style:name="pr2" style:family="presentation" style:parent-style-name="Vivid1-notes">
      <style:graphic-properties draw:fill-color="#ffffff" draw:auto-grow-height="false" fo:min-height="0.101cm" loext:decorative="false"/>
      <style:paragraph-properties style:writing-mode="lr-tb"/>
    </style:style>
    <style:style style:name="pr3" style:family="presentation" style:parent-style-name="Vivid2-subtitle">
      <style:graphic-properties draw:fill-color="#ffffff" draw:textarea-horizontal-align="center" fo:min-height="4cm" loext:decorative="false"/>
      <style:paragraph-properties style:writing-mode="lr-tb"/>
    </style:style>
    <style:style style:name="pr4" style:family="presentation" style:parent-style-name="Vivid2-notes">
      <style:graphic-properties draw:fill-color="#ffffff" draw:auto-grow-height="false" fo:min-height="0.101cm" loext:decorative="false"/>
      <style:paragraph-properties style:writing-mode="lr-tb"/>
    </style:style>
    <style:style style:name="pr5" style:family="presentation" style:parent-style-name="Vivid2-subtitle">
      <style:graphic-properties draw:fill-color="#ffffff" draw:textarea-horizontal-align="center" fo:min-height="4.75cm" loext:decorative="false"/>
      <style:paragraph-properties style:writing-mode="lr-tb"/>
    </style:style>
    <style:style style:name="pr6" style:family="presentation" style:parent-style-name="Vivid2-notes">
      <style:graphic-properties draw:fill-color="#ffffff" draw:auto-grow-height="false" fo:min-height="14.001cm" loext:decorative="false"/>
      <style:paragraph-properties style:writing-mode="lr-tb"/>
    </style:style>
    <style:style style:name="pr7" style:family="presentation" style:parent-style-name="Vivid2-subtitle">
      <style:graphic-properties draw:fill-color="#ffffff" fo:min-height="3.75cm" loext:decorative="false"/>
      <style:paragraph-properties style:writing-mode="lr-tb"/>
    </style:style>
    <style:style style:name="pr8" style:family="presentation" style:parent-style-name="Vivid2-subtitle">
      <style:graphic-properties draw:fill-color="#ffffff" fo:min-height="3.25cm" loext:decorative="false"/>
      <style:paragraph-properties style:writing-mode="lr-tb"/>
    </style:style>
    <style:style style:name="pr9" style:family="presentation" style:parent-style-name="Vivid2-title">
      <style:graphic-properties draw:textarea-horizontal-align="center" fo:min-height="2.751cm" loext:decorative="false"/>
      <style:paragraph-properties style:writing-mode="lr-tb"/>
    </style:style>
    <style:style style:name="pr10" style:family="presentation" style:parent-style-name="Vivid2-outline1">
      <style:graphic-properties fo:min-height="10.251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text-align="center"/>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loext:graphic-properties draw:fill-color="#ffffff"/>
      <style:paragraph-properties fo:text-align="center"/>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agraph-properties fo:margin-top="0.42cm" fo:margin-bottom="0.35cm"/>
      <style:text-properties fo:font-size="10pt" style:font-size-asian="10pt" style:font-size-complex="10pt"/>
    </style:style>
    <style:style style:name="P6" style:family="paragraph">
      <loext:graphic-properties draw:fill="none"/>
    </style:style>
    <style:style style:name="P7" style:family="paragraph">
      <style:paragraph-properties fo:text-align="center"/>
      <style:text-properties fo:font-weight="bold" style:font-weight-asian="bold" style:font-weight-complex="bold"/>
    </style:style>
    <style:style style:name="P8" style:family="paragraph">
      <loext:graphic-properties draw:fill-color="#ffffff"/>
      <style:paragraph-properties fo:text-align="center"/>
      <style:text-properties fo:font-weight="bold" style:font-weight-asian="bold" style:font-weight-complex="bold"/>
    </style:style>
    <style:style style:name="P9" style:family="paragraph">
      <style:paragraph-properties fo:margin-top="0.42cm" fo:margin-bottom="0.35cm" fo:text-align="start"/>
      <style:text-properties fo:font-size="10pt" style:font-size-asian="10pt" style:font-size-complex="10pt"/>
    </style:style>
    <style:style style:name="P10" style:family="paragraph">
      <style:paragraph-properties fo:text-align="center"/>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draw:page draw:name="page1" draw:style-name="dp1" draw:master-page-name="Vivid1" presentation:presentation-page-layout-name="AL1T1">
        <office:forms form:automatic-focus="false" form:apply-design-mode="false"/>
        <draw:frame presentation:style-name="pr1" draw:layer="layout" svg:width="25.2cm" svg:height="2.75cm" svg:x="1.4cm" svg:y="0.25cm" presentation:class="title" presentation:user-transformed="true">
          <draw:text-box>
            <text:p>ΕΛΛΗΝΙΚΟΣ ΕΘΝΙΚΟΣ ΥΜΝΟΣ</text:p>
          </draw:text-box>
        </draw:frame>
        <draw:frame draw:style-name="gr1" draw:text-style-name="P1" draw:layer="layout" svg:width="22cm" svg:height="12.221cm" svg:x="3cm" svg:y="3.279cm" presentation:class="graphic" presentation:user-transformed="true">
          <draw:image xlink:href="Pictures/1000000000000384000001F49835FC81.jpg" xlink:type="simple" xlink:show="embed" xlink:actuate="onLoad" draw:mime-type="image/jpeg">
            <text:p/>
          </draw:image>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Vivid2" presentation:presentation-page-layout-name="AL2T32">
        <office:forms form:automatic-focus="false" form:apply-design-mode="false"/>
        <draw:frame presentation:style-name="pr3" draw:text-style-name="P4" draw:layer="layout" svg:width="25.2cm" svg:height="4cm" svg:x="1.5cm" svg:y="1cm" presentation:class="subtitle" presentation:user-transformed="true">
          <draw:text-box>
            <text:p text:style-name="P3"><text:span text:style-name="T1">ΛΙΓΑ ΛΟΓΙΑ</text:span></text:p>
          </draw:text-box>
          <office:event-listeners>
            <presentation:event-listener script:event-name="dom:click" presentation:action="show" xlink:href="https://www.youtube.com/watch?v=p_9OmbsujsQ&amp;list=RDp_9OmbsujsQ&amp;start_radio=1" xlink:type="simple" xlink:show="embed" xlink:actuate="onRequest"/>
          </office:event-listeners>
        </draw:frame>
        <draw:frame draw:style-name="gr1" draw:text-style-name="P1" draw:layer="layout" svg:width="12.699cm" svg:height="9.312cm" svg:x="2cm" svg:y="4.688cm">
          <draw:image xlink:href="Pictures/1000000000000258000001B8755DEF0B.jpg" xlink:type="simple" xlink:show="embed" xlink:actuate="onLoad" draw:mime-type="image/jpeg">
            <text:p/>
          </draw:image>
        </draw:frame>
        <draw:frame draw:style-name="gr3" draw:text-style-name="P6" draw:layer="layout" svg:width="11.5cm" svg:height="9.5cm" svg:x="16cm" svg:y="4.5cm">
          <draw:text-box>
            <text:p text:style-name="P5"><text:span text:style-name="T2">Ύμνος εις την Ελευθερίαν είναι ποίημα που έγραψε ο </text:span><text:span text:style-name="T2"><text:a xlink:href="https://el.wikipedia.org/wiki/Διονύσιος_Σολωμός" xlink:type="simple">Διονύσιος Σολωμός</text:a></text:span><text:span text:style-name="T2"> το 1823. Αποτελείται από 158 στροφές ή 632 στίχους. Οι 2 πρώτες στροφές είναι ο </text:span><text:span text:style-name="T2"><text:a xlink:href="https://el.wikipedia.org/wiki/Εθνικός_ύμνος" xlink:type="simple">εθνικός ύμνος</text:a></text:span><text:span text:style-name="T2"> της </text:span><text:span text:style-name="T2"><text:a xlink:href="https://el.wikipedia.org/wiki/Ελλάδα" xlink:type="simple">Ελλάδας</text:a></text:span><text:span text:style-name="T2"> (από το 1865) και της </text:span><text:span text:style-name="T2"><text:a xlink:href="https://el.wikipedia.org/wiki/Κύπρος" xlink:type="simple">Κύπρου</text:a></text:span><text:span text:style-name="T2"> (από το 1966), σε μελοποίηση του </text:span><text:span text:style-name="T2"><text:a xlink:href="https://el.wikipedia.org/wiki/Νικόλαος_Μάντζαρος" xlink:type="simple">Νικολάου Μάντζαρου</text:a></text:span><text:span text:style-name="T2">. </text:span></text:p>
          </draw:text-box>
        </draw:frame>
        <presentation:notes draw:style-name="dp2">
          <draw:page-thumbnail draw:style-name="gr2"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Vivid2" presentation:presentation-page-layout-name="AL2T32">
        <office:forms form:automatic-focus="false" form:apply-design-mode="false"/>
        <draw:frame presentation:style-name="pr5" draw:text-style-name="P8" draw:layer="layout" svg:width="19.5cm" svg:height="4.75cm" svg:x="3.5cm" svg:y="0.75cm" presentation:class="subtitle" presentation:user-transformed="true">
          <draw:text-box>
            <text:p text:style-name="P7"><text:span text:style-name="T2">ΙΣΤΟΡΙΚΗ ΣΗΜΑΣΙΑ</text:span></text:p>
          </draw:text-box>
        </draw:frame>
        <draw:frame draw:style-name="gr3" draw:text-style-name="P6" draw:layer="layout" svg:width="15.5cm" svg:height="10cm" svg:x="12.5cm" svg:y="4.5cm">
          <draw:text-box>
            <text:p text:style-name="P5"><text:span text:style-name="T2">Το </text:span><text:span text:style-name="T2"><text:a xlink:href="https://el.wikipedia.org/wiki/Ποίημα" xlink:type="simple">ποίημα</text:a></text:span><text:span text:style-name="T2"> γράφτηκε από τον </text:span><text:span text:style-name="T2"><text:a xlink:href="https://el.wikipedia.org/wiki/Διονύσιος_Σολωμός" xlink:type="simple">Διονύσιο Σολωμό</text:a></text:span><text:span text:style-name="T2"> τον Μάιο του 1823 στη </text:span><text:span text:style-name="T2"><text:a xlink:href="https://el.wikipedia.org/wiki/Ζάκυνθος" xlink:type="simple">Ζάκυνθο</text:a></text:span><text:span text:style-name="T2"> και δύο χρόνια αργότερα (1825) τυπώθηκε για πρώτη φορά στην Ελλάδα, στο </text:span><text:span text:style-name="T2"><text:a xlink:href="https://el.wikipedia.org/wiki/Μεσολόγγι" xlink:type="simple">Μεσολόγγι</text:a></text:span><text:span text:style-name="T2">. Το ποίημα συνδυάζει στοιχεία από τον </text:span><text:span text:style-name="T2"><text:a xlink:href="https://el.wikipedia.org/wiki/Ρομαντισμός" xlink:type="simple">ρομαντισμό</text:a></text:span><text:span text:style-name="T2"> αλλά και τον </text:span><text:span text:style-name="T2"><text:a xlink:href="https://el.wikipedia.org/wiki/Κλασικισμός" xlink:type="simple">κλασικισμό</text:a></text:span><text:span text:style-name="T2">. Οι στροφές που χρησιμοποιούνται είναι τετράστιχες, ενώ, στους στίχους παρατηρείται εναλλαγή τροχαϊκών οκτασύλλαβων και επτασύλλαβων. Το 1828 μελοποιήθηκε από τον Κερκυραίο </text:span><text:span text:style-name="T2"><text:a xlink:href="https://el.wikipedia.org/wiki/Νικόλαος_Μάντζαρος" xlink:type="simple">Νικόλαο Μάντζαρο</text:a></text:span><text:span text:style-name="T2"> πάνω σε λαϊκά μοτίβα, για τετράφωνη ανδρική χορωδία. Από τότε ακουγόταν τακτικά σε εθνικές γιορτές, αλλά και στα σπίτια των Κερκυραίων αστών και αναγνωρίστηκε στη συνείδηση των Ιονίων ως άτυπος ύμνος της Επτανήσου. Ακολούθησαν και άλλες μελοποιήσεις από τον Μάντζαρο (2η το 1837 και 3η το 1839-40), ο οποίος υπέβαλε το έργο του στο Βασιλιά </text:span><text:span text:style-name="T2"><text:a xlink:href="https://el.wikipedia.org/wiki/Όθων_της_Ελλάδας" xlink:type="simple">Όθωνα</text:a></text:span><text:span text:style-name="T2"> .</text:span></text:p>
          </draw:text-box>
        </draw:frame>
        <draw:frame draw:style-name="gr1" draw:text-style-name="P1" draw:layer="layout" svg:width="11.284cm" svg:height="7.495cm" svg:x="1cm" svg:y="5.005cm">
          <draw:image xlink:href="Pictures/10000000000004B00000031D9C3A8603.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Vivid2" presentation:presentation-page-layout-name="AL2T32">
        <office:forms form:automatic-focus="false" form:apply-design-mode="false"/>
        <draw:frame presentation:style-name="pr7" draw:text-style-name="P2" draw:layer="layout" svg:width="25.2cm" svg:height="3.75cm" svg:x="1.4cm" svg:y="0.75cm" presentation:class="subtitle" presentation:user-transformed="true">
          <draw:text-box>
            <text:p>ΙΣΤΟΡΙΚΗ ΣΗΜΑΣΙΑ(2)</text:p>
          </draw:text-box>
        </draw:frame>
        <draw:frame draw:style-name="gr3" draw:text-style-name="P6" draw:layer="layout" svg:width="26.484cm" svg:height="11cm" svg:x="1.016cm" svg:y="4cm">
          <draw:text-box>
            <text:p text:style-name="P9"><text:span text:style-name="T3">Παρά την τιμητική επιβράβευση του μουσικοσυνθέτη Μάντζαρου με τον </text:span><text:span text:style-name="T3"><text:a xlink:href="https://el.wikipedia.org/wiki/Αργυρός_Σταυρός_του_Τάγματος_του_Σωτήρα" xlink:type="simple">Αργυρό Σταυρό του Τάγματος του Σωτήρα</text:a></text:span><text:span text:style-name="T3"> (Ιούνιος 1845) και του Διονυσίου Σολωμού με το Χρυσό Σταυρό του ίδιου Τάγματος (1849), το έργο (και ειδικά η πρώτη μελοποίησή του) διαδόθηκε μεν ως «</text:span><text:span text:style-name="T3"><text:a xlink:href="https://el.wikipedia.org/wiki/Θούριος" xlink:type="simple">θούριος</text:a></text:span><text:span text:style-name="T3">», αλλά δεν υιοθετήθηκε ως ύμνος από τον Όθωνα. Ο Μάντζαρος το </text:span><text:span text:style-name="T3"><text:a xlink:href="https://el.wikipedia.org/wiki/1861" xlink:type="simple">1861</text:a></text:span><text:span text:style-name="T3"> επανεξέτασε για 5η φορά το έργο, αυτή τη φορά σε ρυθμό εμβατηρίου κατά παραγγελία του Υπουργού Στρατιωτικών.</text:span></text:p>
            <text:p text:style-name="P9"><text:span text:style-name="T3">Όταν ο Βασιλιάς </text:span><text:span text:style-name="T3"><text:a xlink:href="https://el.wikipedia.org/wiki/Γεώργιος_Α'_της_Ελλάδος" xlink:type="simple">Γεώργιος Α΄</text:a></text:span><text:span text:style-name="T3"> επισκέφθηκε την </text:span><text:span text:style-name="T3"><text:a xlink:href="https://el.wikipedia.org/wiki/Κέρκυρα" xlink:type="simple">Κέρκυρα</text:a></text:span><text:span text:style-name="T3"> το 1865 μετά την ενσωμάτωση των </text:span><text:span text:style-name="T3"><text:a xlink:href="https://el.wikipedia.org/wiki/Επτάνησα" xlink:type="simple">Επτανήσων</text:a></text:span><text:span text:style-name="T3"> με την Ελλάδα, άκουσε την εκδοχή για ορχήστρα πνευστών της αρχής της πρώτης μελοποίησης που έπαιζε η μπάντα της Φιλαρμονικής Εταιρείας Κέρκυρας και του έκανε εντύπωση. Ακολούθησε Βασιλικό Διάταγμα του Υπουργείου Ναυτικών (Υπουργός </text:span><text:span text:style-name="T3"><text:a xlink:href="https://el.wikipedia.org/wiki/Δημήτριος_Μπουντούρης" xlink:type="simple">Δ. Στ. Μπουντούρης</text:a></text:span><text:span text:style-name="T3">) που το χαρακτήρισε «επίσημον εθνικόν άσμα» και διατάχθηκε η εκτέλεσή του «κατά πάσας τας ναυτικάς παρατάξεις του Βασιλικού Ναυτικού». Επίσης ενημερώθηκαν οι ξένοι πρέσβεις, ώστε να ανακρούεται και από τα ξένα πλοία στις περιπτώσεις απόδοσης τιμών προς τον Βασιλιά της Ελλάδος ή την Ελληνική Σημαία. Από τότε θεωρείται ως εθνικός ύμνος της </text:span><text:span text:style-name="T3"><text:a xlink:href="https://el.wikipedia.org/wiki/Ελλάδα" xlink:type="simple">Ελλάδος</text:a></text:span><text:span text:style-name="T3">.</text:span></text:p>
            <text:p text:style-name="P9"/>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Vivid2" presentation:presentation-page-layout-name="AL2T32">
        <office:forms form:automatic-focus="false" form:apply-design-mode="false">
          <form:form form:name="Φόρμα"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Πιεστικό πλήκτρο 1" form:control-implementation="ooo:com.sun.star.form.component.CommandButton" xml:id="control1" form:id="control1" form:label="ΕΘΝΙΚΟΣ ΥΜΝΟΣ" form:button-type="url" office:target-frame="" xlink:href="https://www.youtube.com/watch?v=p_9OmbsujsQ&amp;list=RDp_9OmbsujsQ&amp;start_radio=1" form:delay-for-repeat="PT0.050000000S" form:image-position="center">
              <form:properties>
                <form:property form:property-name="DefaultControl" office:value-type="string" office:string-value="com.sun.star.form.control.CommandButton"/>
              </form:properties>
            </form:button>
          </form:form>
        </office:forms>
        <draw:frame presentation:style-name="pr8" draw:text-style-name="P2" draw:layer="layout" svg:width="25.2cm" svg:height="3.25cm" svg:x="1.4cm" svg:y="0.75cm" presentation:class="subtitle" presentation:user-transformed="true">
          <draw:text-box>
            <text:p>ΚΛΕΙΝΟΝΤΑΣ</text:p>
          </draw:text-box>
        </draw:frame>
        <draw:frame draw:style-name="gr3" draw:text-style-name="P6" draw:layer="layout" svg:width="15.337cm" svg:height="4.5cm" svg:x="12.5cm" svg:y="9cm">
          <draw:text-box>
            <text:p text:style-name="P5"><text:span text:style-name="T4">Το ποίημα «Ύμνος εις την Ελευθερίαν» αποτελείται από 158 τετράστιχες στροφές· από αυτές οι 24 πρώτες καθιερώθηκαν ως </text:span><text:span text:style-name="T4"><text:a xlink:href="https://el.wikipedia.org/wiki/Εθνικός_ύμνος" xlink:type="simple">εθνικός ύμνος</text:a></text:span><text:span text:style-name="T4"> το 1865. Οι δύο πρώτες ανακρούονται και συνοδεύουν πάντα την έπαρση και την υποστολή της σημαίας και ψάλλονται σε επίσημες στιγμές και τελετές. Κατά τη διάρκεια της ανάκρουσής του αποδίδονται ορθίως τιμές στρατιωτικού χαιρετισμού «εν ακινησία». </text:span></text:p>
          </draw:text-box>
        </draw:frame>
        <draw:frame draw:style-name="gr1" draw:text-style-name="P1" draw:layer="layout" svg:width="7.5cm" svg:height="10.606cm" svg:x="2.5cm" svg:y="3.5cm">
          <draw:image xlink:href="Pictures/10000000000001D200000293E40D22C2.png" xlink:type="simple" xlink:show="embed" xlink:actuate="onLoad" draw:mime-type="image/png">
            <text:p/>
          </draw:image>
        </draw:frame>
        <draw:control draw:style-name="gr4" draw:text-style-name="P10" draw:layer="layout" svg:width="3.999cm" svg:height="0.999cm" svg:x="12.793cm" svg:y="7.409cm" draw:control="control1"/>
        <presentation:notes draw:style-name="dp2">
          <office:forms form:automatic-focus="false" form:apply-design-mode="false"/>
          <draw:page-thumbnail draw:style-name="gr2"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Vivid2" presentation:presentation-page-layout-name="AL3T0">
        <office:forms form:automatic-focus="false" form:apply-design-mode="false"/>
        <draw:frame presentation:style-name="pr9" draw:text-style-name="P7" draw:layer="layout" svg:width="25.2cm" svg:height="2.75cm" svg:x="1.4cm" svg:y="0.75cm" presentation:class="title">
          <draw:text-box>
            <text:p text:style-name="P7"><text:span text:style-name="T2">ΟΛΥΜΠΙΑΚΟΣ ΥΜΝΟΣ</text:span></text:p>
          </draw:text-box>
        </draw:frame>
        <draw:frame draw:style-name="gr1" draw:text-style-name="P1" draw:layer="layout" svg:width="18cm" svg:height="11.812cm" svg:x="5.5cm" svg:y="3cm">
          <draw:image xlink:href="Pictures/1000000000000280000001A47A4140C5.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Vivid2" presentation:presentation-page-layout-name="AL1T1">
        <office:forms form:automatic-focus="false" form:apply-design-mode="false"/>
        <draw:frame presentation:style-name="pr9" draw:text-style-name="P7" draw:layer="layout" svg:width="25.2cm" svg:height="2.75cm" svg:x="1.4cm" svg:y="0.75cm" presentation:class="title" presentation:user-transformed="true">
          <draw:text-box>
            <text:p text:style-name="P7"><text:span text:style-name="T2">ΤΑ ΒΑΣΙΚΑ ΣΤΟΙΧΕΙΑ</text:span></text:p>
          </draw:text-box>
        </draw:frame>
        <draw:frame draw:style-name="gr3" draw:text-style-name="P6" draw:layer="layout" svg:width="14.5cm" svg:height="4.343cm" svg:x="12.5cm" svg:y="6.157cm">
          <draw:text-box>
            <text:p text:style-name="P9">Ο Ολυμπιακός Ύμνος είναι μια μουσική σύνθεση που συντέθηκε για τους πρώτους σύγχρονους <text:a xlink:href="https://el.wikipedia.org/wiki/Θερινοί_Ολυμπιακοί_Αγώνες_1896" xlink:type="simple">Ολυμπιακούς Αγώνες της Αθήνας το 1896</text:a> από τον Κερκυραίο συνθέτη <text:a xlink:href="https://el.wikipedia.org/wiki/Σπύρος_Σαμάρας" xlink:type="simple">Σπύρο Σαμάρα</text:a>, σε <text:a xlink:href="https://el.wikipedia.org/wiki/Ποίηση" xlink:type="simple">ποίηση</text:a> και στίχους του <text:a xlink:href="https://el.wikipedia.org/wiki/Κωστής_Παλαμάς" xlink:type="simple">Κωστή Παλαμά</text:a>.</text:p>
            <text:p text:style-name="P9">Γράφτηκε ένα χρόνο νωρίτερα και ακούστηκε για πρώτη φορά τον Ιανουάριο του 1896 στο Φιλολογικό Σύλλογο "Παρνασσός". Στις 25 Μαρτίου 1896, ο Βασιλιάς Γεώργιος από το Παναθηναϊκό Στάδιο κήρυξε την τελετή έναρξης των Α' Σύγχρονων Ολυμπιακών Αγώνων.</text:p>
            <text:p text:style-name="P9"/>
          </draw:text-box>
        </draw:frame>
        <draw:frame draw:style-name="gr1" draw:text-style-name="P1" draw:layer="layout" svg:width="11.675cm" svg:height="6.5cm" svg:x="0.5cm" svg:y="4.5cm">
          <draw:image xlink:href="Pictures/10000000000004B0000002A334C7F816.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Vivid2" presentation:presentation-page-layout-name="AL1T1">
        <office:forms form:automatic-focus="false" form:apply-design-mode="false"/>
        <draw:frame presentation:style-name="pr9" draw:text-style-name="P7" draw:layer="layout" svg:width="25.2cm" svg:height="2.75cm" svg:x="1.4cm" svg:y="0.75cm" presentation:class="title" presentation:user-transformed="true">
          <draw:text-box>
            <text:p text:style-name="P7"><text:span text:style-name="T2">ΤΑ ΕΠΟΜΕΝΑ ΧΡΟΝΙΑ</text:span></text:p>
          </draw:text-box>
        </draw:frame>
        <draw:frame draw:style-name="gr3" draw:text-style-name="P6" draw:layer="layout" svg:width="13.5cm" svg:height="2.5cm" svg:x="14.5cm" svg:y="7cm">
          <draw:text-box>
            <text:p text:style-name="P5"><text:span text:style-name="T2">Κατά τις επόμενες </text:span><text:span text:style-name="T2"><text:a xlink:href="https://el.wikipedia.org/wiki/Ολυμπιακοί_Αγώνες" xlink:type="simple">Ολυμπιάδες</text:a></text:span><text:span text:style-name="T2"> και μέχρι το 1956, η εκάστοτε διοργανώτρια χώρα ήταν υποχρεωμένη να διοργανώνει τον δικό της Ολυμπιακό Ύμνο, κάτι που δεν αποδείχθηκε εύλογο. Έτσι το 1936 ο Ύμνος των Αγώνων του Βερολίνου, τον οποίο ειχε συνθέσει ο Ρίχαρντ Στράους, αποφασίστηκε να είναι ο μόνιμος Ύμνος των Ολυμπιακών Αγώνων. Απόφαση που λίγο αργότερα ανακλήθηκε και από το 1954 έως το 1956 επικράτησε ο Ύμνος του Πολωνού Μίχα Σπίσακ. Όλα αυτά μέχρι το </text:span><text:span text:style-name="T2"><text:a xlink:href="https://el.wikipedia.org/wiki/1958" xlink:type="simple">1958</text:a></text:span><text:span text:style-name="T2"> όταν ο ύμνος των Σαμάρα / Παλαμά επελέγη από την </text:span><text:span text:style-name="T2"><text:a xlink:href="https://el.wikipedia.org/wiki/Διεθνής_Ολυμπιακή_Επιτροπή" xlink:type="simple">Διεθνή Ολυμπιακή Επιτροπή</text:a></text:span><text:span text:style-name="T2"> ως ο επίσημος ύμνος του Ολυμπιακού Κινήματος και από την </text:span><text:span text:style-name="T2"><text:a xlink:href="https://el.wikipedia.org/wiki/Θερινοί_Ολυμπιακοί_Αγώνες_1960" xlink:type="simple">Ολυμπιάδα της Ρώμης το 1960</text:a></text:span><text:span text:style-name="T2"> ανακρούεται στις τελετές έναρξης και λήξης κάθε Ολυμπιάδας, συνήθως μεταγλωττισμένος στη </text:span><text:span text:style-name="T2"><text:a xlink:href="https://el.wikipedia.org/wiki/Γλώσσα" xlink:type="simple">γλώσσα</text:a></text:span><text:span text:style-name="T2"> της διοργανώτριας χώρας. Ο Ολυμπιακός Ύμνος έχει μεταφραστεί σχεδόν σε όλες τις γλώσσες, ωστόσο είναι αρκετές οι διοργανώτριες χώρες που προτιμούν να ακουστεί στην ελληνική. </text:span></text:p>
          </draw:text-box>
        </draw:frame>
        <draw:frame draw:style-name="gr1" draw:text-style-name="P1" draw:layer="layout" svg:width="12.117cm" svg:height="8.898cm" svg:x="1.383cm" svg:y="4.5cm">
          <draw:image xlink:href="Pictures/1000000000000280000001D62342B495.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Vivid2" presentation:presentation-page-layout-name="AL1T1">
        <office:forms form:automatic-focus="false" form:apply-design-mode="false">
          <form:form form:name="Φόρμα"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9" draw:text-style-name="P7" draw:layer="layout" svg:width="24.6cm" svg:height="1.75cm" svg:x="1.4cm" svg:y="0.75cm" presentation:class="title" presentation:user-transformed="true">
          <draw:text-box>
            <text:p text:style-name="P7"><text:span text:style-name="T2">ΟΙ ΣΤΙΧΟΙ ΤΟΥ ΠΑΛΑΜΙΚΟΥ ΠΟΙΗΜΑΤΟΣ</text:span></text:p>
          </draw:text-box>
        </draw:frame>
        <draw:frame draw:style-name="gr3" draw:text-style-name="P6" draw:layer="layout" svg:width="10.5cm" svg:height="1cm" svg:x="17cm" svg:y="8.5cm">
          <draw:text-box>
            <text:p text:style-name="P5">Αρχαίο πνεύμ' αθάνατον, αγνέ πατέρα</text:p>
            <text:p text:style-name="P5">Του ωραίου, του μεγάλου και του αληθινού</text:p>
            <text:p text:style-name="P5">Κατέβα φανερώσου κι άστραψε εδώ πέρα</text:p>
            <text:p text:style-name="P5">Στην δόξα της δικής σου γης και του ουρανού.</text:p>
            <text:p text:style-name="P5"/>
            <text:p text:style-name="P5">Στον δρόμο και στο μάλεμα και στο λιθάρι</text:p>
            <text:p text:style-name="P5">Στων ευγενών αγώνων, λάμψε την ορμή</text:p>
            <text:p text:style-name="P5">Και με το αμάραντο στεφάνωσε κλωνάρι</text:p>
            <text:p text:style-name="P5">Και σιδερένιο πλάσε και άξιο το κορμί.</text:p>
            <text:p text:style-name="P5"/>
            <text:p text:style-name="P5">Κάμποι βουνά και θάλασσες φέγγουνε μαζί σου</text:p>
            <text:p text:style-name="P5">Σαν ένας λευκοπόρφυρός μέγας ναός</text:p>
            <text:p text:style-name="P5">Και τρέχει στον ναό εδώ προσκυνητής σου</text:p>
            <text:p text:style-name="P5">Αρχαίο πνεύμ' αθάνατο κάθε λαός! </text:p>
          </draw:text-box>
        </draw:frame>
        <draw:frame draw:style-name="gr1" draw:text-style-name="P1" draw:layer="layout" svg:width="15.052cm" svg:height="8.361cm" svg:x="1.448cm" svg:y="4cm">
          <draw:image xlink:href="Pictures/1000000000000384000001F42C3ADFAB.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Vivid2" presentation:presentation-page-layout-name="AL4T3">
        <office:forms form:automatic-focus="false" form:apply-design-mode="false"/>
        <draw:frame presentation:style-name="pr9" draw:text-style-name="P7" draw:layer="layout" svg:width="25.2cm" svg:height="2.75cm" svg:x="1.4cm" svg:y="0.75cm" presentation:class="title">
          <draw:text-box>
            <text:p text:style-name="P7"><text:span text:style-name="T2">ΤΕΛΟΣ!!</text:span></text:p>
          </draw:text-box>
        </draw:frame>
        <draw:frame draw:style-name="gr1" draw:text-style-name="P1" draw:layer="layout" svg:width="16.567cm" svg:height="8.5cm" svg:x="1.179cm" svg:y="4.5cm" presentation:class="graphic" presentation:user-transformed="true">
          <draw:image xlink:href="Pictures/100000000000076C000003CF5C394CFE.jpg" xlink:type="simple" xlink:show="embed" xlink:actuate="onLoad" draw:mime-type="image/jpeg">
            <text:p/>
          </draw:image>
        </draw:frame>
        <draw:frame presentation:style-name="pr10" draw:layer="layout" svg:width="9.11cm" svg:height="6.5cm" svg:x="17.5cm" svg:y="4cm" presentation:class="outline" presentation:user-transformed="true">
          <draw:text-box>
            <text:list text:style-name="L3">
              <text:list-item>
                <text:p>Η ΕΡΓΑΣΙΑ ΔΗΜΙΟΥΡΓΗΘΗΚΕ ΑΠΟ ΤΟΝ ΜΑΘΗΤΗ ΚΩΝΣΤΑΝΤΙΝΟ ΛΟΥΚΑ</text:p>
              </text:list-item>
            </text:list>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l" fo:country="G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style:use-window-font-color="true" loext:opacity="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αριθμός&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presentation:date-time/></text:p>
        </draw:text-box>
      </draw:frame>
      <draw:frame presentation:style-name="Mpr2" draw:text-style-name="MP6" draw:layer="backgroundobjects" svg:width="9cm" svg:height="1.25cm" svg:x="9.5cm" svg:y="14.25cm" presentation:class="footer">
        <draw:text-box>
          <text:p text:style-name="MP6"><presentation:footer/></text:p>
        </draw:text-box>
      </draw:frame>
      <draw:frame presentation:style-name="Mpr1" draw:text-style-name="MP4" draw:layer="backgroundobjects" svg:width="6.5cm" svg:height="1.25cm" svg:x="20.1cm" svg:y="14.25cm" presentation:class="page-number">
        <draw:text-box>
          <text:p text:style-name="MP3"><text:page-number>&lt;αριθμός&gt;</text:page-number></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office:forms form:automatic-focus="false" form:apply-design-mode="false"/>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Vivid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presentation:date-time/></text:p>
        </draw:text-box>
      </draw:frame>
      <draw:frame presentation:style-name="Mpr6" draw:text-style-name="MP6" draw:layer="backgroundobjects" svg:width="9cm" svg:height="1.25cm" svg:x="9.5cm" svg:y="14.25cm" presentation:class="footer">
        <draw:text-box>
          <text:p text:style-name="MP6"><presentation:footer/></text:p>
        </draw:text-box>
      </draw:frame>
      <draw:frame presentation:style-name="Mpr5" draw:text-style-name="MP4" draw:layer="backgroundobjects" svg:width="6.5cm" svg:height="1.25cm" svg:x="20.1cm" svg:y="14.25cm" presentation:class="page-number">
        <draw:text-box>
          <text:p text:style-name="MP3"><text:page-number>&lt;αριθμός&gt;</text:page-number></text:p>
        </draw:text-box>
      </draw:frame>
      <presentation:notes style:page-layout-name="PM0">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αριθμός&gt;</text:page-number></text:p>
          </draw:text-box>
        </draw:frame>
      </presentation:notes>
    </style:master-page>
    <style:master-page style:name="Vivid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presentation:date-time/></text:p>
        </draw:text-box>
      </draw:frame>
      <draw:frame presentation:style-name="Mpr10" draw:text-style-name="MP6" draw:layer="backgroundobjects" svg:width="9cm" svg:height="1.25cm" svg:x="9.5cm" svg:y="14.25cm" presentation:class="footer">
        <draw:text-box>
          <text:p text:style-name="MP6"><presentation:footer/></text:p>
        </draw:text-box>
      </draw:frame>
      <draw:frame presentation:style-name="Mpr9" draw:text-style-name="MP4" draw:layer="backgroundobjects" svg:width="6.5cm" svg:height="1.25cm" svg:x="20.1cm" svg:y="14.25cm" presentation:class="page-number">
        <draw:text-box>
          <text:p text:style-name="MP3"><text:page-number>&lt;αριθμός&gt;</text:page-number></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αριθμός&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1-24T14:56:46.166821900</meta:creation-date>
    <dc:description>This work is licensed under a Creative Commons 0 License.
It makes use of the works of fsanchez.</dc:description>
    <meta:generator>LibreOffice/25.8.3.2$Windows_X86_64 LibreOffice_project/8ca8d55c161d602844f5428fa4b58097424e324e</meta:generator>
    <dc:title>Vivid</dc:title>
    <meta:editing-duration>PT11M22S</meta:editing-duration>
    <meta:editing-cycles>2</meta:editing-cycles>
    <dc:date>2025-11-24T16:04:34.867101100</dc:date>
    <meta:document-statistic meta:object-count="92"/>
  </office:meta>
</office:document-meta>
</file>