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21a07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24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Τίτλος: «Τρία Χρόνια &amp; Ένα Στενάκι»</text:span></text:p>
      <text:p text:style-name="Text_20_body"><text:span text:style-name="Emphasis">Intro</text:span><text:line-break/>Yeah…<text:line-break/>Για σένα, <text:span text:style-name="Strong_20_Emphasis">Α.</text:span>,<text:line-break/>κι ας μη μιλάς πια…</text:p>
      <text:p text:style-name="Text_20_body"><text:span text:style-name="Emphasis">Κουπλέ 1</text:span><text:line-break/>Τρία χρόνια γράψαμε στίχους χωρίς χαρτί,<text:line-break/>σε παγκάκια αγκαλιά, κόντρα σε ό,τι μας <text:span text:style-name="T1">ponei</text:span><text:line-break/>Πλατείες μάρτυρες, θέατρα σιωπηλά,<text:line-break/>κι εγώ να παίζω τον μάγκα ενώ σε φοβόμουν βαθιά.</text:p>
      <text:p text:style-name="Text_20_body">Κάλαντα στις παραλίες, χειμώνας και φως,<text:line-break/>γελούσες κι έλεγα “αυτό είναι ο κόσμος μου όλος”.<text:line-break/>Πρώτο φιλί στο Μεγάλο, σε ένα στενό μισοσκότεινο,<text:line-break/>εκεί που ο χρόνος σταμάτησε κι έγινε αιώνιο.</text:p>
      <text:p text:style-name="Text_20_body"><text:span text:style-name="Emphasis">Ρεφρέν</text:span><text:line-break/>Αν με ακούς ακόμα, <text:span text:style-name="Strong_20_Emphasis">Α.</text:span>, γύρνα λίγο πίσω,<text:line-break/>έκανα λάθη βαριά, μα τα ’χω πληρώσει ίσως.<text:line-break/>Σε έφυγα ξαφνικά, χωρίς λέξη, χωρίς φωνή,<text:line-break/>μα η αγάπη δε φεύγει, απλά μαθαίνει να πονεί.</text:p>
      <text:p text:style-name="Text_20_body"><text:span text:style-name="Emphasis">Κουπλέ 2</text:span><text:line-break/>Σε χώρισα απ’ τη βλακεία μου, το παραδέχομαι ωμά,<text:line-break/>νόμιζα πως η σιωπή γιατρεύει, μα σκοτώνει τελικά.<text:line-break/>Τρεις μήνες μετά, σου ’δωσα ένα ημερολόγιο,<text:line-break/>κάθε σελίδα κι ένα “σ’ αγαπώ” σε άλλο λεξιλόγιο.</text:p>
      <text:p text:style-name="Text_20_body">Έγραψα τα λάθη μου, χωρίς να κρυφτώ,<text:line-break/>μα κι αυτά που ένιωσα πως έκανες κι εσύ σε μένα εδώ.<text:line-break/>Όχι για να κατηγορήσω, μα για να ειπωθεί,<text:line-break/>πως ο πόνος θέλει δυο καρδιές για να μοιραστεί.</text:p>
      <text:p text:style-name="Text_20_body"><text:span text:style-name="Emphasis">Ρεφρέν</text:span><text:line-break/>Αν με κοιτάς στο σχολείο και δε λες λέξη καμιά,<text:line-break/>να ξέρεις πως φωνάζω μέσα μου κάθε βραδιά.<text:line-break/><text:span text:style-name="Strong_20_Emphasis">Α.</text:span>, δεν είσαι παρελθόν, είσαι πληγή ανοιχτή,<text:line-break/>κι ό,τι κι αν κάνω, το μυαλό μου σε ζητεί.</text:p>
      <text:p text:style-name="Text_20_body"><text:span text:style-name="Emphasis">Κουπλέ 3</text:span><text:line-break/>Ένας μήνας σιωπή, πιο βαριά κι απ’ τον χωρισμό,<text:line-break/>να σε βλέπω μπροστά μου και να χάνω τον εαυτό μου εγώ.<text:line-break/>Αν θες να φύγεις, πες το, θα το αντέξω somehow,<text:line-break/>μα μη με σκοτώνεις έτσι, με βλέμμα και no sound.</text:p>
      <text:p text:style-name="Text_20_body">Δεν ζητάω να ξεχάσεις, ούτε να σβηστούν πληγές,<text:line-break/>ζητάω μια κουβέντα, να σωθούν ό,τι<text:span text:style-name="T2"> </text:span><text:span text:style-name="T3">eipes</text:span>χθες.<text:line-break/>Γιατί η αγάπη αν τελειώσει, το νιώθεις, το ξέρεις,<text:line-break/>μα εδώ ακόμα καίει <text:span text:style-name="T3">omvs </text:span>κι εσύ το βλέπεις.</text:p>
      <text:p text:style-name="Text_20_body"><text:soft-page-break/><text:span text:style-name="Emphasis">Outro</text:span><text:line-break/>Αν ποτέ ανοίξεις εκείνο το ημερολόγιο ξανά,<text:line-break/>να θυμηθείς πως ήμασταν αλήθεια, όχι απλά “μαζί”.<text:line-break/>Εγώ εδώ θα ’μαι, με λάθη, φόβο και καρδιά,<text:line-break/>να περιμένω ένα βλέμμα να μου πει “μίλα μου πια”.</text:p>
      <text:p text:style-name="Standard"/>
      <text:p text:style-name="Standard"/>
      <text:p text:style-name="Standard"/>
      <text:p text:style-name="Text_20_body"><text:span text:style-name="Emphasis">Intro</text:span><text:line-break/>Yeah…<text:line-break/>Για την <text:span text:style-name="Strong_20_Emphasis">Α.</text:span><text:line-break/>ό,τι δεν είπα τότε.</text:p>
      <text:p text:style-name="Text_20_body"><text:span text:style-name="Emphasis">Κουπλέ 1</text:span><text:line-break/>Τρία χρόνια δίπλα, γράφαμε ζωή,<text:line-break/>σε παγκάκια αγκαλιά, χαμένοι στη σιωπή.<text:line-break/>Πλατείες, θέατρα, φώτα χαμηλά,<text:line-break/>κι εγώ να παίζω άμυνα ενώ ήθελα πολλά.</text:p>
      <text:p text:style-name="Text_20_body">Κάλαντα <text:s/>παραλίες, κρύο και φωτιά,<text:line-break/>γελούσες κι έλεγα “αυτό είναι καρδιά”.<text:line-break/>Πρώτο φιλί στο <text:span text:style-name="T2">Μεγά</text:span><text:span text:style-name="T1">r</text:span><text:span text:style-name="T2">ο</text:span>, στενό μυστικό,<text:line-break/>εκεί που ο χρόνος κόλλησε, έμεινε εδώ.</text:p>
      <text:p text:style-name="Text_20_body"><text:span text:style-name="Emphasis">Ρεφρέν</text:span><text:line-break/>αν με ακούς, δεν έφυγα γιατί δε σε θέλω,<text:line-break/>έφυγα γιατί φοβήθηκα, αυτό μόνο ξέρω.<text:line-break/>Σε άφησα ξαφνικά, <text:s/>χωρίς φωνή,<text:line-break/>μα ό,τι κι αν κάνω, είσαι ακόμα εσύ.</text:p>
      <text:p text:style-name="Text_20_body"><text:span text:style-name="Emphasis">Κουπλέ 2</text:span><text:line-break/>Έκανα λάθη βαριά, δεν το παίζω σωστός,<text:line-break/>νόμιζα πως ήμουν μάγκας, ήμουν απλά μικρός.<text:line-break/>Τρεις μήνες μετά, σου ’δωσα χαρτί,<text:line-break/>ένα ημερολόγιο γεμάτο “εμείς”.</text:p>
      <text:p text:style-name="Text_20_body"/>
      <text:p text:style-name="Text_20_body"><text:span text:style-name="Emphasis">Ρεφρέν</text:span><text:line-break/>Α., αν με βλέπεις και δε λες τίποτα πια,<text:line-break/>να ξέρεις μέσα μου γίνεται μάχη βαριά.<text:line-break/>Ένας μήνας σιωπή, πιο δυνατή απ’ φωνή,<text:line-break/>κι εγώ να ψάχνω τρόπο να σου μιλήσω ξανά.</text:p>
      <text:p text:style-name="Text_20_body"/>
      <text:p text:style-name="Text_20_body"/>
      <text:p text:style-name="Text_20_body"><text:line-break/></text:p>
      <text:p text:style-name="Standard"><text:soft-page-break/></text:p>
      <text:p text:style-name="Standard"/>
      <text:p text:style-name="Text_20_body"><text:span text:style-name="Emphasis">Intro</text:span><text:line-break/>Yeah…<text:line-break/>Για τη <text:span text:style-name="Strong_20_Emphasis">7</text:span><text:line-break/>ό,τι δεν ειπώθηκε.</text:p>
      <text:p text:style-name="Text_20_body"><text:span text:style-name="Emphasis">Κουπλέ 1</text:span><text:line-break/>Τρία χρόνια δίπλα, χωρίς σενάριο γραμμένο,<text:line-break/>σε παγκάκια αγκαλιά, με τον κόσμο παγωμένο.<text:line-break/>Πλατείες, θέατρα, φώτα χαμηλά,<text:line-break/>κι εγώ να κρύβω φόβους πίσω απ’ το “είμαι καλά”.</text:p>
      <text:p text:style-name="Text_20_body">Κάλαντα σε παραλίες, χειμώνας φωτιά,<text:line-break/>γελούσες κι έλεγα “έτσι μοιάζει η καρδιά”.<text:line-break/>Πρώτο φιλί στο Μεγάλο, στενό σκοτεινό,<text:line-break/>εκεί που το για πάντα έμοιαζε απλό.</text:p>
      <text:p text:style-name="Text_20_body"><text:span text:style-name="Emphasis">Ρεφρέν</text:span><text:line-break/>7, αν με ακούς, δεν έφυγα γιατί δε νιώθω,<text:line-break/>έφυγα γιατί φοβήθηκα να δείξω όλο τον κόσμο.<text:line-break/>Σε άφησα ξαφνικά, χωρίς λέξη, χωρίς φωνή,<text:line-break/>μα ό,τι κι αν κάνω, γυρνάω</text:p>
      <text:p text:style-name="Standard"/>
      <text:p text:style-name="Standard"/>
      <text:p text:style-name="Text_20_body"><text:span text:style-name="Emphasis">Intro</text:span><text:line-break/>Yeah…<text:line-break/>αν το καταλάβεις, είναι για σένα.</text:p>
      <text:p text:style-name="Text_20_body"><text:span text:style-name="Emphasis">Κουπλέ 1</text:span><text:line-break/>Μικρό κορμί, μα καρδιά από ατσάλι,<text:line-break/>μπαίνει στο χώρο κι αλλάζει το πλάνο και πάλι.<text:line-break/>Φοράει το κόκκινο σαν να ’ναι γραφτό,<text:line-break/>κι εγώ αντίπαλος πάντα, μα χάνω <text:s/><text:span text:style-name="T3">to </text:span>σκορ </text:p>
      <text:p text:style-name="Text_20_body">Της άρεσαν τάξεις, στολές και κανόνες,<text:line-break/>εγώ όλο λάθη, βραδιές και συγγνώμες.<text:line-break/>Με μάτια που βλέπουν αν λες αλήθεια,<text:line-break/>κι εγώ να κρύβομαι πίσω απ’ τα ίδια.</text:p>
      <text:p text:style-name="Text_20_body"><text:span text:style-name="Emphasis">Ρεφρέν</text:span><text:line-break/>Αν το ακούς και χαμογελάς, το ’πιασες,<text:line-break/>δεν είπα όνομα, μα με κατάλαβες.<text:line-break/>Δεν είναι τραγούδι, είναι παρελθόν,<text:line-break/>είναι δυο χρώματα, ένας Θεός κι ένας νόμος σιωπηλός.</text:p>
      <text:p text:style-name="Text_20_body"><text:span text:style-name="Emphasis">Κουπλέ 2</text:span><text:line-break/>Κοντή μα φλόγα, δε χώραγε εύκολα,<text:line-break/>σε λάθος μυαλά, σε σχέδια πρόχειρα.<text:line-break/><text:soft-page-break/>Με έβαζε ίσια, εγώ έστριβα πάντα,<text:line-break/>κι όταν έφυγα έτσι, το έκανα στάχτη.</text:p>
      <text:p text:style-name="Text_20_body">Τρεις κύκλοι χρόνου, χαραγμένοι στο δέρμα,<text:line-break/>σε παγκάκια, πλατείες, χωρίς καν τέρμα.<text:line-break/>Ένα στενό που δεν έχει πινακίδα,<text:line-break/>μα αν περάσεις από ’κει θυμάσαι τι είδα.</text:p>
      <text:p text:style-name="Text_20_body"><text:span text:style-name="Emphasis">Ρεφρέν</text:span><text:line-break/>Αν το ακούς και πονάει λίγο εδώ,<text:line-break/>εκεί που χτυπάει το “μαζί” και το “εγώ”.<text:line-break/>Δεν είπα ποια είσαι, μα ξέρεις καλά,<text:line-break/>γιατί κάποια λόγια δε λέγονται τυχαία πια.</text:p>
      <text:p text:style-name="Text_20_body"><text:span text:style-name="Emphasis">Κουπλέ 3</text:span><text:line-break/>Τώρα περνάς και κοιτάς μπροστά,<text:line-break/>κι εγώ κάνω πως έμαθα να μη μιλάω ξανά.<text:line-break/>Τάξη και χάος σε ίδιο σχολείο,<text:line-break/>κι εγώ να ψάχνω θάρρος στο ίδιο σημείο.</text:p>
      <text:p text:style-name="Text_20_body">Αν ποτέ αναρωτηθείς αν ακόμα ισχύει,<text:line-break/>δες αν αυτό το κομμάτι σου κόβει την πνοή.<text:line-break/>Γιατί ό,τι δεν είπα όταν έπρεπε να βγει,<text:line-break/>το ’κλεισα σε ρίμες να σε βρουν μόνες τους εκεί.</text:p>
      <text:p text:style-name="Text_20_body"><text:span text:style-name="Emphasis">Outro</text:span><text:line-break/>Δε θέλω απάντηση, ούτε επιστροφή,<text:line-break/>μόνο να ξέρεις πως σεβάστηκα τη σιωπή.<text:line-break/>Κι αν κάποιος ρωτήσει “για ποια μιλάς;”<text:line-break/>θα πω “για καμία”…<text:line-break/>κι εσύ θα γελά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7:55:31.339917500</meta:creation-date>
    <dc:date>2026-01-24T01:35:56.395617100</dc:date>
    <meta:editing-duration>PT19H3M11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32" meta:word-count="836" meta:character-count="4593" meta:non-whitespace-character-count="3783"/>
  </office:meta>
</office:document-meta>
</file>